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auto-grow-height="true" fo:min-height="13.859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36. Primitives. Equations différentielles</text:p>
            <text:p>Niveau : Terminale spécialité <text:span text:style-name="T1">(</text:span></text:p>
            <text:p><text:span text:style-name="T1">Référence : Barbazo Terminale spéci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érequi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érivation : fonctions usuelles, composition et dérivée seconde</text:p>
              </text:list-item>
              <text:list-item>
                <text:p>Notion de fonction continue</text:p>
              </text:list-item>
              <text:list-item>
                <text:p>Fonctions exponentielles, logarith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 de la leç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quation différentielle y'=f</text:p>
                <text:list>
                  <text:list-header>
                    <text:p>- Définition primitive et propriétés</text:p>
                    <text:p>- Calcul d'une primitive d'une fonction</text:p>
                  </text:list-header>
                </text:list>
              </text:list-item>
              <text:list-item>
                <text:p>Equation différentielle y'=ay+f</text:p>
                <text:list>
                  <text:list-header>
                    <text:p>- Cas f=b constante réelle : y'=ay puis y'=ay+b</text:p>
                    <text:p>- Cas f non constante</text:p>
                  </text:list-header>
                </text:list>
              </text:list-item>
              <text:list-item>
                <text:p>Approndissement </text:p>
                <text:list>
                  <text:list-header>
                    <text:p>- Exemples de résolution exactes</text:p>
                    <text:p>- Résolution approchée avec la méthode d'Eul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1) Equations différentielles y'=f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euves :</text:p>
                <text:p><text:span text:style-name="T2">Les primitives d'une fonction diffèrent d'une constante. (page 218)</text:span></text:p>
                <text:p><text:span text:style-name="T2">Toute fonction continue sur un intervalle I admet des primitive (preuve avec intégrale cas f croissante et positive sur un intervalle fermé page 250) savoir expliquer généralisation</text:span></text:p>
              </text:list-item>
              <text:list-item>
                <text:p>Exercices en lien avec cette partie :</text:p>
                <text:p><text:span text:style-name="T2">Application techniques de calculs : exo 44 p 230</text:span></text:p>
                <text:p><text:span text:style-name="T2">Exemple important : primitive de ln exo 45 p 23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2) Equations différentielles y'=ay+f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reuves</text:p>
                <text:p><text:span text:style-name="T3">- Les solutions de y'=ay sont de la forme Cexp(ax) (page 218)</text:span></text:p>
                <text:p><text:span text:style-name="T3">- Les solutions de y'=ay+b sont de la forme Cexp(ax) – b/a (page 219)</text:span></text:p>
                <text:p><text:span text:style-name="T3">- Les solutions de y'=ay+f sont de la forme Cexp(ax)+g(x) avec g solution particulière (exo 66 p 233)</text:span></text:p>
              </text:list-item>
              <text:list-item>
                <text:p>Exercices</text:p>
                <text:p><text:span text:style-name="T3">Exo 91.1 page 238, Exo 69 page 233</text:span></text:p>
              </text:list-item>
              <text:list-item>
                <text:p>Illustration numérique  </text:p>
                <text:p><text:span text:style-name="T3">Courbes x-&gt; Cexp(ax) suivante valeurs de a et C avec Geogeb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3) Approfondisse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xemples de résolution exacte d'autres équations différentielles :</text:p>
                <text:p><text:span text:style-name="T3">-</text:span> </text:p>
              </text:list-item>
              <text:list-item>
                <text:p>Résolution approchée avec la méthode d'Euler</text:p>
                <text:list>
                  <text:list-header>
                    <text:p><text:span text:style-name="T3">- EDO différente de y'=ay+f</text:span></text:p>
                    <text:p><text:span text:style-name="T3">- EDO du type y'=f mais on ne sait pas calculer une primitive de f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therine Delville</meta:initial-creator>
    <meta:creation-date>2026-06-04T11:01:08.77</meta:creation-date>
    <meta:editing-duration>PT27M16S</meta:editing-duration>
    <meta:editing-cycles>12</meta:editing-cycles>
    <dc:date>2026-06-04T11:28:20.04</dc:date>
    <dc:creator>Catherine Delville</dc:creator>
    <meta:generator>OpenOffice/4.1.6$Win32 OpenOffice.org_project/416m1$Build-9790</meta:generator>
    <meta:document-statistic meta:object-count="44"/>
  </office:meta>
</office:document-meta>
</file>