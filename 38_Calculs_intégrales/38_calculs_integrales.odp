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04FB98D9.png"/>
  <manifest:file-entry manifest:media-type="image/png" manifest:full-path="Pictures/1000020100000280000001E0F84E6505.png"/>
  <manifest:file-entry manifest:media-type="image/png" manifest:full-path="Pictures/1000020100000280000001E0431083CF.png"/>
  <manifest:file-entry manifest:media-type="image/png" manifest:full-path="Pictures/1000020100000280000001E01DB333C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draw:auto-grow-height="true" fo:min-height="6.61cm"/>
    </style:style>
    <style:style style:name="pr8" style:family="presentation" style:parent-style-name="Standard-outline1">
      <style:graphic-properties draw:auto-grow-height="true" fo:min-height="3.086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38. Exemples de calculs d'intégrales (méthodes exactes, méthodes approchées)</text:p>
            <text:p><text:span text:style-name="T1">Niveau : Terminale Spécialité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érequi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ntinuité et dérivation d'une fonction réelle</text:p>
              </text:list-item>
              <text:list-item>
                <text:p>Notion de primitive</text:p>
              </text:list-item>
              <text:list-item>
                <text:p>Définition d'une intégrale sur un intervalle</text:p>
              </text:list-item>
              <text:list-item>
                <text:p>Variables aléatoires : Bernoulli, loi binomiale, loi des grands nombres (pour la méthode de Monte-Carl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Plan de la leç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éthodes exactes :</text:p>
                <text:list>
                  <text:list-header>
                    <text:p>- Calcul de primitive</text:p>
                    <text:p>- Intégration par parties</text:p>
                    <text:p>- Changement de variable</text:p>
                  </text:list-header>
                </text:list>
              </text:list-item>
              <text:list-item>
                <text:p>Méthodes approchées :</text:p>
                <text:list>
                  <text:list-header>
                    <text:p>- Méthode des rectangles</text:p>
                    <text:p>- Méthode du point milieu et méthode des trapèzes</text:p>
                    <text:p>- Méthode de Monte-Carl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4">
        <draw:frame presentation:style-name="pr3" draw:layer="layout" svg:width="25.199cm" svg:height="3.506cm" svg:x="1.4cm" svg:y="0.837cm" presentation:class="title">
          <draw:text-box>
            <text:p>2) Méthodes approchées</text:p>
          </draw:text-box>
        </draw:frame>
        <draw:frame presentation:style-name="pr7" draw:layer="layout" svg:width="25.199cm" svg:height="6.61cm" svg:x="1.4cm" svg:y="4.914cm" presentation:class="outline">
          <draw:text-box>
            <text:list text:style-name="L3">
              <text:list-item>
                <text:p>Convergence et erreur méthode des rectangles, point milieu et trapèze</text:p>
                <text:p>Exemple pour différences valeurs de n, I = 0.4</text:p>
              </text:list-item>
              <text:list-item>
                <text:p><text:span text:style-name="T2"><text:a xlink:href="../rectangle_milieu.py">C:\Bureau\Roxane\38_Calculs_integrales\rectangle_milieu.py</text:a></text:span><text:span text:style-name="T2"> </text:span></text:p>
              </text:list-item>
            </text:list>
          </draw:text-box>
        </draw:frame>
        <draw:frame draw:style-name="gr2" draw:text-style-name="P1" draw:layer="layout" svg:width="12.013cm" svg:height="8.8cm" svg:x="7.787cm" svg:y="11.4cm" presentation:class="graphic" presentation:user-transformed="true">
          <draw:image xlink:href="Pictures/1000020100000280000001E004FB98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34">
        <draw:frame presentation:style-name="pr8" draw:layer="layout" svg:width="25cm" svg:height="8.647cm" svg:x="1.4cm" svg:y="4.914cm" presentation:class="outline" presentation:user-transformed="true">
          <draw:text-box>
            <text:list text:style-name="L3">
              <text:list-item>
                <text:p>Principe de la méthode de Monte-Carlo, loi des grands nombres</text:p>
              </text:list-item>
              <text:list-item>
                <text:p>Exemple de calcul approché pour différentes valeurs de n : 100, 1000 et 10 000</text:p>
                <text:p><text:span text:style-name="T2"><text:a xlink:href="../monte_carlo.py">C:\Bureau\Roxane\38_Calculs_integrales\monte_carlo.py</text:a></text:span></text:p>
                <text:p/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2) Méthodes approchées</text:p>
          </draw:text-box>
        </draw:frame>
        <draw:frame draw:style-name="gr2" draw:text-style-name="P1" draw:layer="layout" svg:width="8.113cm" svg:height="6.084cm" svg:x="18.438cm" svg:y="12.416cm" presentation:class="graphic">
          <draw:image xlink:href="Pictures/1000020100000280000001E01DB333CE.png" xlink:type="simple" xlink:show="embed" xlink:actuate="onLoad">
            <text:p/>
          </draw:image>
        </draw:frame>
        <draw:frame draw:style-name="gr2" draw:text-style-name="P1" draw:layer="layout" svg:width="8.113cm" svg:height="6.084cm" svg:x="9.918cm" svg:y="12.416cm" presentation:class="graphic">
          <draw:image xlink:href="Pictures/1000020100000280000001E0F84E6505.png" xlink:type="simple" xlink:show="embed" xlink:actuate="onLoad">
            <text:p/>
          </draw:image>
        </draw:frame>
        <draw:frame draw:style-name="gr2" draw:text-style-name="P1" draw:layer="layout" svg:width="8.113cm" svg:height="6.084cm" svg:x="1.399cm" svg:y="12.416cm" presentation:class="graphic">
          <draw:image xlink:href="Pictures/1000020100000280000001E0431083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therine Delville</meta:initial-creator>
    <meta:creation-date>2026-06-08T11:51:13.37</meta:creation-date>
    <meta:editing-duration>PT20M30S</meta:editing-duration>
    <meta:editing-cycles>12</meta:editing-cycles>
    <dc:date>2026-06-08T12:11:40.38</dc:date>
    <dc:creator>Catherine Delville</dc:creator>
    <meta:generator>OpenOffice/4.1.6$Win32 OpenOffice.org_project/416m1$Build-9790</meta:generator>
    <meta:document-statistic meta:object-count="44"/>
  </office:meta>
</office:document-meta>
</file>