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42000000ABEA4E1C34.png"/>
  <manifest:file-entry manifest:media-type="image/png" manifest:full-path="Pictures/10000000000000DD00000051A029B988.png"/>
  <manifest:file-entry manifest:media-type="image/png" manifest:full-path="Pictures/10000000000001B90000005FD8CC3E44.png"/>
  <manifest:file-entry manifest:media-type="image/png" manifest:full-path="Pictures/10000000000000C80000004A1D361B97.png"/>
  <manifest:file-entry manifest:media-type="image/png" manifest:full-path="Pictures/10000000000000C800000067C376867E.png"/>
  <manifest:file-entry manifest:media-type="image/png" manifest:full-path="Pictures/1000000000000113000000E76CA9A83B.png"/>
  <manifest:file-entry manifest:media-type="image/png" manifest:full-path="Pictures/100000000000011D00000080162B4F70.png"/>
  <manifest:file-entry manifest:media-type="image/png" manifest:full-path="Pictures/10000000000001F500000062A7EE31E7.png"/>
  <manifest:file-entry manifest:media-type="image/png" manifest:full-path="Pictures/10000000000001B3000000B5299336E9.png"/>
  <manifest:file-entry manifest:media-type="image/png" manifest:full-path="Pictures/10000000000000F10000002D9EF0E32D.png"/>
  <manifest:file-entry manifest:media-type="image/png" manifest:full-path="Pictures/100000000000010900000037491693C8.png"/>
  <manifest:file-entry manifest:media-type="image/png" manifest:full-path="Pictures/10000000000001290000004DECB4CFA8.png"/>
  <manifest:file-entry manifest:media-type="image/png" manifest:full-path="Pictures/100000000000013F000000607A3B5CEB.png"/>
  <manifest:file-entry manifest:media-type="image/png" manifest:full-path="Pictures/10000000000000E1000000BD473D1680.png"/>
  <manifest:file-entry manifest:media-type="image/png" manifest:full-path="Pictures/100000000000013D00000128DD7446AE.png"/>
  <manifest:file-entry manifest:media-type="image/png" manifest:full-path="Pictures/10000000000000CE00000042F97383B6.png"/>
  <manifest:file-entry manifest:media-type="image/png" manifest:full-path="Pictures/10000000000000D50000006781F2440C.png"/>
  <manifest:file-entry manifest:media-type="image/png" manifest:full-path="Pictures/10000000000000460000002495FE4E0D.png"/>
  <manifest:file-entry manifest:media-type="image/png" manifest:full-path="Pictures/10000000000000FE00000091E52CF4B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fo:min-height="0.952cm"/>
    </style:style>
    <style:style style:name="gr4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fo:min-height="17.935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draw:auto-grow-height="true" fo:min-height="13.859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title">
      <style:graphic-properties fo:min-height="3.506cm"/>
    </style:style>
    <style:style style:name="pr7" style:family="presentation" style:parent-style-name="Standard-outline1">
      <style:graphic-properties fo:min-height="13.859cm"/>
    </style:style>
    <style:style style:name="pr8" style:family="presentation" style:parent-style-name="Standard-outline1">
      <style:graphic-properties draw:auto-grow-height="true" fo:min-height="6.61cm"/>
    </style:style>
    <style:style style:name="pr9" style:family="presentation" style:parent-style-name="Standard-outline1">
      <style:graphic-properties fo:min-height="4.4cm"/>
    </style:style>
    <style:style style:name="pr10" style:family="presentation" style:parent-style-name="Standard-outline1">
      <style:graphic-properties fo:min-height="6.61cm"/>
    </style:style>
    <style:style style:name="pr11" style:family="presentation" style:parent-style-name="Standard-outline1">
      <style:graphic-properties fo:min-height="9.017cm"/>
    </style:style>
    <style:style style:name="pr12" style:family="presentation" style:parent-style-name="Standard-outline1">
      <style:graphic-properties fo:min-height="1.4cm"/>
    </style:style>
    <style:style style:name="pr13" style:family="presentation" style:parent-style-name="Standard-outline1">
      <style:graphic-properties fo:min-height="7.533cm"/>
    </style:style>
    <style:style style:name="pr14" style:family="presentation" style:parent-style-name="Standard-outline1">
      <style:graphic-properties fo:min-height="1.01cm"/>
    </style:style>
    <style:style style:name="pr15" style:family="presentation" style:parent-style-name="Standard-outline1">
      <style:graphic-properties fo:min-height="6.693cm"/>
    </style:style>
    <style:style style:name="pr16" style:family="presentation" style:parent-style-name="Standard-outline1">
      <style:graphic-properties fo:min-height="3.286cm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text-properties fo:font-size="32pt" style:font-size-asian="32pt" style:font-size-complex="32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text-position="sub 58%"/>
    </style:style>
    <style:style style:name="T4" style:family="text">
      <style:text-properties style:text-position="0% 100%" fo:font-size="20pt" style:font-size-asian="20pt" style:font-size-complex="20pt"/>
    </style:style>
    <style:style style:name="T5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style:text-position="sub 58%" fo:font-size="22pt" style:font-size-asian="22pt" style:font-size-complex="22pt"/>
    </style:style>
    <style:style style:name="T8" style:family="text">
      <style:text-properties style:text-position="0% 100%" fo:font-size="22pt" style:font-size-asian="22pt" style:font-size-complex="22pt"/>
    </style:style>
    <style:style style:name="T9" style:family="text">
      <style:text-properties style:text-position="super 58%" fo:font-size="22pt" style:font-size-asian="22pt" style:font-size-complex="22pt"/>
    </style:style>
    <style:style style:name="T10" style:family="text">
      <style:text-properties style:text-position="33% 58%" fo:font-size="22pt" style:font-size-asian="22pt" style:font-size-complex="22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style:text-position="sub 58%" fo:font-size="20pt" style:font-size-asian="20pt" style:font-size-complex="20pt"/>
    </style:style>
    <style:style style:name="T13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4" style:family="text">
      <style:text-properties fo:font-size="20pt" fo:font-weight="normal" style:font-size-asian="20pt" style:font-weight-asian="normal" style:font-size-complex="20pt" style:font-weight-complex="normal"/>
    </style:style>
    <style:style style:name="T15" style:family="text">
      <style:text-properties style:text-position="super 58%" fo:font-size="20pt" fo:font-weight="normal" style:font-size-asian="20pt" style:font-weight-asian="normal" style:font-size-complex="20pt" style:font-weight-complex="normal"/>
    </style:style>
    <style:style style:name="T16" style:family="text">
      <style:text-properties fo:font-family="Arial" style:font-style-name="Normal" style:font-family-generic="swiss" fo:font-size="20pt" fo:font-weight="normal" style:font-family-asian="Arial" style:font-style-name-asian="Normal" style:font-family-generic-asian="swiss" style:font-size-asian="20pt" style:font-weight-asian="normal" style:font-family-complex="Arial" style:font-style-name-complex="Normal" style:font-family-generic-complex="swiss" style:font-size-complex="20pt" style:font-weight-complex="normal"/>
    </style:style>
    <style:style style:name="T17" style:family="text">
      <style:text-properties style:text-position="sub 58%" fo:font-size="20pt" fo:font-weight="normal" style:font-size-asian="20pt" style:font-weight-asian="normal" style:font-size-complex="20pt" style:font-weight-complex="normal"/>
    </style:style>
    <style:style style:name="T18" style:family="text">
      <style:text-properties fo:font-family="Arial" style:font-style-name="Normal" style:font-family-generic="swiss" fo:font-size="22pt" style:font-family-asian="Arial" style:font-style-name-asian="Normal" style:font-family-generic-asian="swiss" style:font-size-asian="22pt" style:font-family-complex="Arial" style:font-style-name-complex="Normal" style:font-family-generic-complex="swiss" style:font-size-complex="22pt"/>
    </style:style>
    <style:style style:name="T19" style:family="text">
      <style:text-properties fo:font-family="Arial" style:font-family-generic="roman" style:font-pitch="variable" fo:font-size="22pt" style:font-family-asian="Arial" style:font-style-name-asian="Normal" style:font-family-generic-asian="swiss" style:font-size-asian="22pt" style:font-family-complex="Arial" style:font-style-name-complex="Normal" style:font-family-generic-complex="swiss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layer="layout" svg:width="25.199cm" svg:height="17.935cm" svg:x="1.4cm" svg:y="0.837cm" presentation:class="subtitle">
          <draw:text-box>
            <text:p><text:span text:style-name="T1">34. Fonctions logarithmes</text:span></text:p>
            <text:p>Niveau : Terminale spécialité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Prérequi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Fonctions exponentielles</text:p>
              </text:list-item>
              <text:list-item>
                <text:p>Limite d'une fonction réelle</text:p>
              </text:list-item>
              <text:list-item>
                <text:p>Limite d'une suite numérique</text:p>
              </text:list-item>
              <text:list-item>
                <text:p>Fonction continue</text:p>
              </text:list-item>
              <text:list-item>
                <text:p>Dérivation (programme de terminal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Plan de la leçon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Définition des logarithmes</text:p>
              </text:list-item>
              <text:list-item>
                <text:p>Équation fonctionnelle et propriétés algébriques</text:p>
              </text:list-item>
              <text:list-item>
                <text:p>Variations et limites des fonctions logarithmes</text:p>
              </text:list-item>
              <text:list-item>
                <text:p>Applications et approfondisseme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1. Définitions des logarithme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Logarithme népérien ln</text:p>
                <text:p/>
                <text:p/>
                <text:p/>
                <text:p><text:span text:style-name="T2">Conséquence : Les courbes représentatives des fonctions ln et exp sont symétriques par rapport à la droite d'équation y=x dans un repère orthnormé.</text:span></text:p>
                <text:p/>
              </text:list-item>
            </text:list>
          </draw:text-box>
        </draw:frame>
        <draw:frame draw:style-name="gr2" draw:text-style-name="P1" draw:layer="layout" svg:width="18.272cm" svg:height="4.6cm" svg:x="2.528cm" svg:y="6.6cm">
          <draw:image xlink:href="Pictures/10000000000001F500000062A7EE31E7.png" xlink:type="simple" xlink:show="embed" xlink:actuate="onLoad">
            <text:p/>
          </draw:image>
        </draw:frame>
        <draw:frame draw:style-name="gr3" draw:layer="layout" svg:width="19.325cm" svg:height="1.202cm" svg:x="2.6cm" svg:y="15.4cm">
          <draw:text-box>
            <text:p><text:a xlink:href="../courbes_log_exp.ggb">C:\Bureau\Roxane\34_logarithmes\courbes_log_exp.ggb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4">
        <draw:frame presentation:style-name="pr8" draw:layer="layout" svg:width="25.199cm" svg:height="6.61cm" svg:x="1.4cm" svg:y="1.79cm" presentation:class="outline" presentation:user-transformed="true">
          <draw:text-box>
            <text:list text:style-name="L2">
              <text:list-item>
                <text:p>Logarithme de base a, a&gt;0, log<text:span text:style-name="T3">a</text:span></text:p>
                <text:p><text:span text:style-name="T4">Soit a un réel strictement positif, la fonction réciproque de l'exponentielle de base a est défnie sur l'ensemble des réels strictement positifs par :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4"><text:s/>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text-style-name="P2" draw:layer="layout" svg:width="25.199cm" svg:height="4.4cm" svg:x="1.401cm" svg:y="9.6cm" presentation:class="outline" presentation:user-transformed="true">
          <draw:text-box>
            <text:list text:style-name="L2">
              <text:list-header>
                <text:p><text:span text:style-name="T5">Exemples :</text:span></text:p>
              </text:list-header>
              <text:list-item>
                <text:p><text:span text:style-name="T2"><text:s/></text:span><text:span text:style-name="T2">Logarithme décimal : a=10, utilisé en sciences (mesure en décibels, pH)</text:span></text:p>
              </text:list-item>
              <text:list-item>
                <text:p><text:span text:style-name="T2"><text:s/></text:span><text:span text:style-name="T2">Logarithme binaire : a=2 utilisé en informatique </text:span></text:p>
              </text:list-item>
            </text:list>
          </draw:text-box>
        </draw:frame>
        <draw:frame draw:style-name="gr2" draw:text-style-name="P1" draw:layer="layout" svg:width="4cm" svg:height="1.8cm" svg:x="10.6cm" svg:y="6cm">
          <draw:image xlink:href="Pictures/10000000000000460000002495FE4E0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4">
        <draw:frame presentation:style-name="pr6" draw:layer="layout" svg:width="25.199cm" svg:height="3.506cm" svg:x="1.316cm" svg:y="0.585cm" presentation:class="title" presentation:user-transformed="true">
          <draw:text-box>
            <text:p>Premières propriétés</text:p>
          </draw:text-box>
        </draw:frame>
        <draw:frame presentation:style-name="pr10" draw:text-style-name="P3" draw:layer="layout" svg:width="25.199cm" svg:height="6.61cm" svg:x="1.316cm" svg:y="4.158cm" presentation:class="outline" presentation:user-transformed="true">
          <draw:text-box>
            <text:list text:style-name="L2">
              <text:list-item>
                <text:p><text:span text:style-name="T6">Logarithme népérien</text:span></text:p>
              </text:list-item>
            </text:list>
          </draw:text-box>
        </draw:frame>
        <draw:frame presentation:style-name="pr11" draw:layer="layout" svg:width="25.199cm" svg:height="9.017cm" svg:x="1.4cm" svg:y="10.755cm" presentation:class="outline" presentation:user-transformed="true">
          <draw:text-box>
            <text:list text:style-name="L2">
              <text:list-item>
                <text:p><text:span text:style-name="T6">De même, pour a réel avec a&gt;0, pour les logarithmes log</text:span><text:span text:style-name="T7">a </text:span><text:span text:style-name="T8">on a :</text:span></text:p>
                <text:list>
                  <text:list-item>
                    <text:p><text:span text:style-name="T6">Pour tout réel b&gt;0 et pour tout réel x, a</text:span><text:span text:style-name="T9">x</text:span><text:span text:style-name="T6">=b équivaut à x=log</text:span><text:span text:style-name="T7">a</text:span><text:span text:style-name="T8"> (b)</text:span></text:p>
                  </text:list-item>
                  <text:list-item>
                    <text:p><text:span text:style-name="T6">log</text:span><text:span text:style-name="T7">a</text:span><text:span text:style-name="T6">(1)=0 et log</text:span><text:span text:style-name="T7">a</text:span><text:span text:style-name="T6">(a)=1</text:span></text:p>
                  </text:list-item>
                  <text:list-item>
                    <text:p><text:span text:style-name="T6">Pour tout réel x&gt;0, a</text:span><text:span text:style-name="T10"> log</text:span><text:span text:style-name="T7">a</text:span><text:span text:style-name="T10">(x)</text:span><text:span text:style-name="T6">=x</text:span></text:p>
                  </text:list-item>
                  <text:list-item>
                    <text:p><text:span text:style-name="T6">Pour tout réel x&gt;0, log</text:span><text:span text:style-name="T7">a</text:span><text:span text:style-name="T6">(a</text:span><text:span text:style-name="T9">x</text:span><text:span text:style-name="T6">)=x</text:span></text:p>
                  </text:list-item>
                </text:list>
                <text:p/>
              </text:list-item>
            </text:list>
          </draw:text-box>
        </draw:frame>
        <draw:frame draw:style-name="gr2" draw:text-style-name="P1" draw:layer="layout" svg:width="14.6cm" svg:height="4.663cm" svg:x="3.2cm" svg:y="5.6cm">
          <draw:image xlink:href="Pictures/100000000000013F000000607A3B5C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4">
        <draw:frame presentation:style-name="pr6" draw:text-style-name="P4" draw:layer="layout" svg:width="25.199cm" svg:height="3.506cm" svg:x="1.4cm" svg:y="0.837cm" presentation:class="title" presentation:user-transformed="true">
          <draw:text-box>
            <text:p>Premières applications</text:p>
          </draw:text-box>
        </draw:frame>
        <draw:frame draw:style-name="gr2" draw:text-style-name="P1" draw:layer="layout" svg:width="12cm" svg:height="5.6cm" svg:x="5cm" svg:y="5.4cm">
          <draw:image xlink:href="Pictures/10000000000000D50000006781F2440C.png" xlink:type="simple" xlink:show="embed" xlink:actuate="onLoad">
            <text:p/>
          </draw:image>
        </draw:frame>
        <draw:frame draw:style-name="gr2" draw:text-style-name="P1" draw:layer="layout" svg:width="13.6cm" svg:height="3.6cm" svg:x="4.8cm" svg:y="12.2cm">
          <draw:image xlink:href="Pictures/100000000000010900000037491693C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4">
        <draw:frame presentation:style-name="pr6" draw:text-style-name="P4" draw:layer="layout" svg:width="25.199cm" svg:height="3.506cm" svg:x="1.4cm" svg:y="0.837cm" presentation:class="title">
          <draw:text-box>
            <text:p><text:span text:style-name="T11">Une méthode de calcul approchée de ln par dichotomie</text:span></text:p>
          </draw:text-box>
        </draw:frame>
        <draw:frame presentation:style-name="pr10" draw:layer="layout" svg:width="25.199cm" svg:height="6.61cm" svg:x="1.4cm" svg:y="4.914cm" presentation:class="outline">
          <draw:text-box>
            <text:list text:style-name="L2">
              <text:list-header>
                <text:p><text:span text:style-name="T6">Soit k un réel strictement positif</text:span></text:p>
              </text:list-header>
              <text:list-item>
                <text:p><text:span text:style-name="T6">Résolution de l'équation e</text:span><text:span text:style-name="T9">x</text:span><text:span text:style-name="T6">=k par dichotomie sur un intervalle [a,b]</text:span></text:p>
                <text:p><text:s text:c="2"/></text:p>
              </text:list-item>
            </text:list>
          </draw:text-box>
        </draw:frame>
        <draw:frame presentation:style-name="pr12" draw:layer="layout" svg:width="25.199cm" svg:height="1.4cm" svg:x="1.4cm" svg:y="16.8cm" presentation:class="outline" presentation:user-transformed="true">
          <draw:text-box>
            <text:list text:style-name="L2">
              <text:list-item>
                <text:p><text:span text:style-name="T2"><text:a xlink:href="../neper_dichotomie.py">C:\Bureau\Roxane\34_logarithmes\neper_dichotomie.py</text:a></text:span></text:p>
              </text:list-item>
            </text:list>
          </draw:text-box>
        </draw:frame>
        <draw:frame draw:style-name="gr2" draw:text-style-name="P1" draw:layer="layout" svg:width="13.8cm" svg:height="8.4cm" svg:x="4.6cm" svg:y="7.8cm">
          <draw:image xlink:href="Pictures/1000000000000142000000ABEA4E1C3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4">
        <draw:frame presentation:style-name="pr6" draw:layer="layout" svg:width="25.199cm" svg:height="3.506cm" svg:x="1.4cm" svg:y="0.837cm" presentation:class="title">
          <draw:text-box>
            <text:p><text:span text:style-name="T11">2) Equation fonctionnelle et propriétés algébriques</text:span> </text:p>
          </draw:text-box>
        </draw:frame>
        <draw:frame presentation:style-name="pr10" draw:text-style-name="P3" draw:layer="layout" svg:width="25.199cm" svg:height="6.61cm" svg:x="1.4cm" svg:y="4.343cm" presentation:class="outline" presentation:user-transformed="true">
          <draw:text-box>
            <text:list text:style-name="L2">
              <text:list-item>
                <text:p><text:span text:style-name="T6">Relation fonctionnelle</text:span></text:p>
              </text:list-item>
            </text:list>
          </draw:text-box>
        </draw:frame>
        <draw:frame presentation:style-name="pr10" draw:text-style-name="P3" draw:layer="layout" svg:width="25.199cm" svg:height="6.61cm" svg:x="1.4cm" svg:y="9.4cm" presentation:class="outline" presentation:user-transformed="true">
          <draw:text-box>
            <text:list text:style-name="L2">
              <text:list-item>
                <text:p><text:span text:style-name="T6">Propriétés algébriques</text:span></text:p>
                <text:p><text:span text:style-name="T6"/></text:p>
              </text:list-item>
            </text:list>
          </draw:text-box>
        </draw:frame>
        <draw:frame draw:style-name="gr2" draw:text-style-name="P1" draw:layer="layout" svg:width="11.2cm" svg:height="2.59cm" svg:x="3.6cm" svg:y="5.81cm">
          <draw:image xlink:href="Pictures/10000000000000F10000002D9EF0E32D.png" xlink:type="simple" xlink:show="embed" xlink:actuate="onLoad">
            <text:p/>
          </draw:image>
        </draw:frame>
        <draw:frame draw:style-name="gr2" draw:text-style-name="P1" draw:layer="layout" svg:width="11.632cm" svg:height="5.847cm" svg:x="3.768cm" svg:y="10.953cm">
          <draw:image xlink:href="Pictures/100000000000011D00000080162B4F7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4">
        <draw:frame presentation:style-name="pr6" draw:layer="layout" svg:width="25.199cm" svg:height="3.506cm" svg:x="1.4cm" svg:y="0.837cm" presentation:class="title">
          <draw:text-box>
            <text:p><text:span text:style-name="T11">Applications</text:span> </text:p>
          </draw:text-box>
        </draw:frame>
        <draw:frame draw:style-name="gr2" draw:text-style-name="P1" draw:layer="layout" svg:width="11.2cm" svg:height="6.857cm" svg:x="2.19cm" svg:y="4.343cm">
          <draw:image xlink:href="Pictures/10000000000000C800000067C376867E.png" xlink:type="simple" xlink:show="embed" xlink:actuate="onLoad">
            <text:p/>
          </draw:image>
        </draw:frame>
        <draw:frame draw:style-name="gr2" draw:text-style-name="P1" draw:layer="layout" svg:width="11.6cm" svg:height="5.4cm" svg:x="2.4cm" svg:y="11.8cm">
          <draw:image xlink:href="Pictures/10000000000000C80000004A1D361B9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4">
        <draw:frame presentation:style-name="pr6" draw:text-style-name="P4" draw:layer="layout" svg:width="25.199cm" svg:height="3.506cm" svg:x="1.4cm" svg:y="0.837cm" presentation:class="title">
          <draw:text-box>
            <text:p><text:span text:style-name="T11">3) Variations et limites du logarithme</text:span></text:p>
          </draw:text-box>
        </draw:frame>
        <draw:frame presentation:style-name="pr10" draw:text-style-name="P3" draw:layer="layout" svg:width="25.199cm" svg:height="6.61cm" svg:x="1.4cm" svg:y="4.19cm" presentation:class="outline" presentation:user-transformed="true">
          <draw:text-box>
            <text:list text:style-name="L2">
              <text:list-item>
                <text:p><text:span text:style-name="T6">Dérivée et variations</text:span></text:p>
                <text:p><text:span text:style-name="T6"/></text:p>
              </text:list-item>
            </text:list>
          </draw:text-box>
        </draw:frame>
        <draw:frame presentation:style-name="pr13" draw:text-style-name="P2" draw:layer="layout" svg:width="25.199cm" svg:height="7.533cm" svg:x="1.601cm" svg:y="10.6cm" presentation:class="outline" presentation:user-transformed="true">
          <draw:text-box>
            <text:list text:style-name="L2">
              <text:list-header>
                <text:p><text:span text:style-name="T2">- Application à l'étude de fonctions composée avec un logarithme, ex : f(x) = ln(x+e-x) définie sur l'ensemble des réels</text:span></text:p>
                <text:p><text:span text:style-name="T2">- Variation des logarithmes log</text:span><text:span text:style-name="T12">a</text:span><text:span text:style-name="T2"> de base a&gt;0 suivant la valeur de a :</text:span></text:p>
                <text:list>
                  <text:list-item>
                    <text:list>
                      <text:list-header>
                        <text:p><text:span text:style-name="T2">- Si 0&lt;a&lt;1, <text:s/>la fonction <text:s/>log</text:span><text:span text:style-name="T12">a</text:span><text:span text:style-name="T2"> est strictement décroissante sur son ensemble de définition </text:span></text:p>
                        <text:p><text:span text:style-name="T2">- Si a&gt;1, la fonction <text:s/>log</text:span><text:span text:style-name="T12">a <text:s/></text:span><text:span text:style-name="T4">est strictement croissante sur son ensemble de définition</text:span></text:p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2" draw:text-style-name="P1" draw:layer="layout" svg:width="16.2cm" svg:height="4.4cm" svg:x="2.6cm" svg:y="5.4cm">
          <draw:image xlink:href="Pictures/10000000000001B90000005FD8CC3E4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14">
        <draw:frame presentation:style-name="pr6" draw:text-style-name="P4" draw:layer="layout" svg:width="25.199cm" svg:height="3.506cm" svg:x="1.4cm" svg:y="0.837cm" presentation:class="title">
          <draw:text-box>
            <text:p><text:span text:style-name="T11">Applications</text:span></text:p>
          </draw:text-box>
        </draw:frame>
        <draw:frame presentation:style-name="pr10" draw:text-style-name="P3" draw:layer="layout" svg:width="25.199cm" svg:height="6.61cm" svg:x="1.4cm" svg:y="4.914cm" presentation:class="outline">
          <draw:text-box>
            <text:list text:style-name="L2">
              <text:list-item>
                <text:p><text:span text:style-name="T6">Propriétés de ln</text:span></text:p>
              </text:list-item>
            </text:list>
          </draw:text-box>
        </draw:frame>
        <draw:frame presentation:style-name="pr14" draw:text-style-name="P3" draw:layer="layout" svg:width="13.6cm" svg:height="1.01cm" svg:x="1.4cm" svg:y="10.79cm" presentation:class="outline" presentation:user-transformed="true">
          <draw:text-box>
            <text:list text:style-name="L2">
              <text:list-item>
                <text:p><text:span text:style-name="T6">Exemple d'application en chimie</text:span></text:p>
              </text:list-item>
            </text:list>
          </draw:text-box>
        </draw:frame>
        <draw:frame draw:style-name="gr2" draw:text-style-name="P1" draw:layer="layout" svg:width="7.849cm" svg:height="3.2cm" svg:x="3.4cm" svg:y="6.4cm">
          <draw:image xlink:href="Pictures/10000000000000CE00000042F97383B6.png" xlink:type="simple" xlink:show="embed" xlink:actuate="onLoad">
            <text:p/>
          </draw:image>
        </draw:frame>
        <draw:frame draw:style-name="gr2" draw:text-style-name="P1" draw:layer="layout" svg:width="8.6cm" svg:height="3.342cm" svg:x="13.6cm" svg:y="6.458cm">
          <draw:image xlink:href="Pictures/10000000000000DD00000051A029B988.png" xlink:type="simple" xlink:show="embed" xlink:actuate="onLoad">
            <text:p/>
          </draw:image>
        </draw:frame>
        <draw:frame draw:style-name="gr2" draw:text-style-name="P1" draw:layer="layout" svg:width="9.752cm" svg:height="6.8cm" svg:x="3.848cm" svg:y="12cm">
          <draw:image xlink:href="Pictures/10000000000000E1000000BD473D168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14">
        <draw:frame presentation:style-name="pr6" draw:text-style-name="P4" draw:layer="layout" svg:width="25.199cm" svg:height="3.506cm" svg:x="1.4cm" svg:y="0.837cm" presentation:class="title">
          <draw:text-box>
            <text:p><text:span text:style-name="T11">Méthode de Briggs : calcul approché du logarithme décimal</text:span></text:p>
          </draw:text-box>
        </draw:frame>
        <draw:frame presentation:style-name="pr15" draw:text-style-name="P2" draw:layer="layout" svg:width="25.199cm" svg:height="6.693cm" svg:x="1.4cm" svg:y="4.343cm" presentation:class="outline" presentation:user-transformed="true">
          <draw:text-box>
            <text:list text:style-name="L2">
              <text:list-item>
                <text:p><text:span text:style-name="T13">Objectif </text:span><text:span text:style-name="T2">: Calcul de log</text:span><text:span text:style-name="T12">10</text:span><text:span text:style-name="T2">(x) avec x réel, x&gt;0</text:span></text:p>
              </text:list-item>
              <text:list-item>
                <text:p><text:span text:style-name="T14">Initialisation avec A=10</text:span><text:span text:style-name="T15">k </text:span><text:span text:style-name="T14">et B=10</text:span><text:span text:style-name="T15">k+1</text:span><text:span text:style-name="T14"> tels que A <text:s/></text:span><text:span text:style-name="T16">≤ </text:span><text:span text:style-name="T14">X </text:span><text:span text:style-name="T16">≤</text:span><text:span text:style-name="T14"> B</text:span></text:p>
              </text:list-item>
              <text:list-item>
                <text:p><text:span text:style-name="T2">Principe de la méthode :</text:span></text:p>
                <text:p><text:span text:style-name="T2">- Si X&lt;</text:span><text:span text:style-name="T16">√</text:span><text:span text:style-name="T2">AB alors log</text:span><text:span text:style-name="T12">10</text:span><text:span text:style-name="T2">(X)&lt;0.5(log</text:span><text:span text:style-name="T12">10</text:span><text:span text:style-name="T2">(A)+log</text:span><text:span text:style-name="T12">10</text:span><text:span text:style-name="T2">(B))</text:span></text:p>
                <text:p><text:span text:style-name="T2">- Sinon </text:span><text:span text:style-name="T14"><text:s/>log</text:span><text:span text:style-name="T17">10</text:span><text:span text:style-name="T14">(X)</text:span><text:span text:style-name="T16">≥</text:span><text:span text:style-name="T14"> 0.5(log</text:span><text:span text:style-name="T17">10</text:span><text:span text:style-name="T14">(A)+log</text:span><text:span text:style-name="T17">10</text:span><text:span text:style-name="T14">(B)) </text:span></text:p>
              </text:list-item>
            </text:list>
          </draw:text-box>
        </draw:frame>
        <draw:frame presentation:style-name="pr14" draw:layer="layout" svg:width="25.199cm" svg:height="1.01cm" svg:x="1.401cm" svg:y="14.39cm" presentation:class="outline" presentation:user-transformed="true">
          <draw:text-box>
            <text:list text:style-name="L2">
              <text:list-item>
                <text:p><text:span text:style-name="T2"><text:a xlink:href="../Briggs.py">C:\Bureau\Roxane\34_logarithmes\Briggs.py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3T14">
        <draw:frame presentation:style-name="pr10" draw:layer="layout" svg:width="25.199cm" svg:height="6.61cm" svg:x="1.4cm" svg:y="1.39cm" presentation:class="outline" presentation:user-transformed="true">
          <draw:text-box>
            <text:list text:style-name="L2">
              <text:list-item>
                <text:p>Limites de la fonction ln</text:p>
                <text:p/>
              </text:list-item>
            </text:list>
          </draw:text-box>
        </draw:frame>
        <draw:frame presentation:style-name="pr10" draw:layer="layout" svg:width="25.199cm" svg:height="6.61cm" svg:x="1.4cm" svg:y="12.153cm" presentation:class="outline">
          <draw:text-box>
            <text:list text:style-name="L2">
              <text:list-item>
                <text:p>Croissance comparée</text:p>
                <text:p/>
              </text:list-item>
            </text:list>
          </draw:text-box>
        </draw:frame>
        <draw:frame draw:style-name="gr2" draw:text-style-name="P1" draw:layer="layout" svg:width="15.2cm" svg:height="6.4cm" svg:x="3cm" svg:y="3.2cm">
          <draw:image xlink:href="Pictures/10000000000001B3000000B5299336E9.png" xlink:type="simple" xlink:show="embed" xlink:actuate="onLoad">
            <text:p/>
          </draw:image>
        </draw:frame>
        <draw:frame draw:style-name="gr2" draw:text-style-name="P1" draw:layer="layout" svg:width="14cm" svg:height="3.4cm" svg:x="2.6cm" svg:y="14.6cm">
          <draw:image xlink:href="Pictures/10000000000001290000004DECB4CFA8.png" xlink:type="simple" xlink:show="embed" xlink:actuate="onLoad">
            <text:p/>
          </draw:image>
        </draw:frame>
        <draw:frame draw:style-name="gr3" draw:layer="layout" svg:width="17.014cm" svg:height="1.202cm" svg:x="2.8cm" svg:y="9.8cm">
          <draw:text-box>
            <text:p><text:a xlink:href="../asymptote.ggb">C:\Bureau\Roxane\34_logarithmes\asymptote.ggb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3T14">
        <draw:frame presentation:style-name="pr6" draw:layer="layout" svg:width="25.199cm" svg:height="3.506cm" svg:x="1.4cm" svg:y="0.837cm" presentation:class="title">
          <draw:text-box>
            <text:p>Application</text:p>
          </draw:text-box>
        </draw:frame>
        <draw:frame draw:style-name="gr2" draw:text-style-name="P1" draw:layer="layout" svg:width="11.333cm" svg:height="10.901cm" svg:x="8cm" svg:y="5.8cm">
          <draw:image xlink:href="Pictures/100000000000013D00000128DD7446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3T14">
        <draw:frame presentation:style-name="pr6" draw:text-style-name="P4" draw:layer="layout" svg:width="25.199cm" svg:height="3.506cm" svg:x="1.4cm" svg:y="0.837cm" presentation:class="title">
          <draw:text-box>
            <text:p><text:span text:style-name="T11">4) Approfondissement</text:span></text:p>
          </draw:text-box>
        </draw:frame>
        <draw:frame presentation:style-name="pr16" draw:text-style-name="P3" draw:layer="layout" svg:width="25.199cm" svg:height="3.286cm" svg:x="1.4cm" svg:y="4.914cm" presentation:class="outline" presentation:user-transformed="true">
          <draw:text-box>
            <text:list text:style-name="L2">
              <text:list-item>
                <text:p><text:span text:style-name="T6">Calcul de la limite de la suite (u</text:span><text:span text:style-name="T7">n</text:span><text:span text:style-name="T6">) de terme général :</text:span></text:p>
                <text:p><text:span text:style-name="T6"><text:s/></text:span><text:span text:style-name="T6">u</text:span><text:span text:style-name="T7">n</text:span><text:span text:style-name="T6"> = (1+1/n)</text:span><text:span text:style-name="T9">n</text:span><text:span text:style-name="T6"> pour n</text:span><text:span text:style-name="T18">≥</text:span><text:span text:style-name="T19">1</text:span></text:p>
              </text:list-item>
            </text:list>
          </draw:text-box>
        </draw:frame>
        <draw:frame presentation:style-name="pr10" draw:text-style-name="P3" draw:layer="layout" svg:width="25.199cm" svg:height="6.61cm" svg:x="1.2cm" svg:y="9cm" presentation:class="outline" presentation:user-transformed="true">
          <draw:text-box>
            <text:list text:style-name="L2">
              <text:list-item>
                <text:p><text:span text:style-name="T6">Etude de la fonction f(x)=x</text:span><text:span text:style-name="T9">a</text:span><text:span text:style-name="T6">, pour x&gt;0 et a réel</text:span></text:p>
              </text:list-item>
            </text:list>
          </draw:text-box>
        </draw:frame>
        <draw:frame draw:style-name="gr4" draw:text-style-name="P1" draw:layer="layout" svg:width="7.275cm" svg:height="6.111cm" svg:x="2.525cm" svg:y="10.489cm">
          <draw:image xlink:href="Pictures/1000000000000113000000E76CA9A83B.png" xlink:type="simple" xlink:show="embed" xlink:actuate="onLoad">
            <text:p/>
          </draw:image>
        </draw:frame>
        <draw:frame draw:style-name="gr4" draw:text-style-name="P1" draw:layer="layout" svg:width="6.719cm" svg:height="3.835cm" svg:x="10.681cm" svg:y="11.2cm">
          <draw:image xlink:href="Pictures/10000000000000FE00000091E52CF4B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therine Delville</meta:initial-creator>
    <meta:creation-date>2026-06-02T09:14:08.81</meta:creation-date>
    <meta:editing-duration>PT2H13M41S</meta:editing-duration>
    <meta:editing-cycles>46</meta:editing-cycles>
    <dc:date>2026-06-02T11:52:58.38</dc:date>
    <dc:creator>Catherine Delville</dc:creator>
    <meta:generator>OpenOffice/4.1.6$Win32 OpenOffice.org_project/416m1$Build-9790</meta:generator>
    <meta:document-statistic meta:object-count="109"/>
  </office:meta>
</office:document-meta>
</file>