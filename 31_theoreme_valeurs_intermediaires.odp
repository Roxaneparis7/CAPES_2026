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7000000CAF393F948.png"/>
  <manifest:file-entry manifest:media-type="image/png" manifest:full-path="Pictures/100002010000028B000001BA7E404B4C.png"/>
  <manifest:file-entry manifest:media-type="image/png" manifest:full-path="Pictures/100002010000028D000001ABC4C3B8B3.png"/>
  <manifest:file-entry manifest:media-type="image/jpeg" manifest:full-path="Pictures/1000000000000421000000B8F7E6F4C1541AE82D.jpg"/>
  <manifest:file-entry manifest:media-type="image/png" manifest:full-path="Pictures/10000201000001640000017843F8E190.png"/>
  <manifest:file-entry manifest:media-type="image/png" manifest:full-path="Pictures/10000201000001E9000000B8F46040CC.png"/>
  <manifest:file-entry manifest:media-type="image/png" manifest:full-path="Pictures/100002010000013E00000175AD7DFF51.png"/>
  <manifest:file-entry manifest:media-type="image/png" manifest:full-path="Pictures/100002010000011600000105E1F2BCAF.png"/>
  <manifest:file-entry manifest:media-type="image/png" manifest:full-path="Pictures/10000201000001FD000001F6DBD650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3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2.533cm"/>
    </style:style>
    <style:style style:name="pr10" style:family="presentation" style:parent-style-name="Blue_5f_Curve1-outline1">
      <style:graphic-properties fo:min-height="5.558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position="super 58%" fo:font-size="22pt" style:font-size-asian="22pt" style:font-size-complex="22pt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style:text-position="0% 100%" fo:font-size="24pt" style:font-size-asian="24pt" style:font-size-complex="24pt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6.31cm" svg:x="0cm" svg:y="5.101cm" presentation:class="title" presentation:user-transformed="true">
          <draw:text-box>
            <text:p>31. Théorème des valeurs intermédiaires<text:line-break/><text:line-break/><text:span text:style-name="T1">Niveau : Terminale enseignement de spéci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Prérequ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priétés des fonctions usuelles</text:p>
              </text:list-item>
              <text:list-item>
                <text:p>Etude des variations d’une fonction</text:p>
              </text:list-item>
              <text:list-item>
                <text:p>Limites d’une fonction, d’une suite réell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lan de la leç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/>Fonction continue sur un intervalle</text:p>
              </text:list-item>
              <text:list-item>
                <text:p>Théorème des valeurs intermédiaires</text:p>
              </text:list-item>
              <text:list-item>
                <text:p>Application aux équations de la forme f(x)=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6">
        <draw:frame presentation:style-name="pr3" draw:text-style-name="P1" draw:layer="layout" svg:width="25.199cm" svg:height="1.771cm" svg:x="1.4cm" svg:y="0.837cm" presentation:class="title">
          <draw:text-box>
            <text:p><text:span text:style-name="T2">1) Fonction réelle continue : définition</text:span></text:p>
          </draw:text-box>
        </draw:frame>
        <draw:frame draw:style-name="gr2" draw:text-style-name="P2" draw:layer="layout" svg:width="21.842cm" svg:height="12.8cm" svg:x="2.4cm" svg:y="3.6cm" presentation:class="graphic" presentation:user-transformed="true">
          <draw:image xlink:href="Pictures/100002010000028B000001BA7E404B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1) Fonctions continues : propriétés</text:span></text:p>
          </draw:text-box>
        </draw:frame>
        <draw:frame draw:style-name="gr3" draw:text-style-name="P2" draw:layer="layout" svg:width="21.8cm" svg:height="14.292cm" svg:x="2.8cm" svg:y="3.708cm">
          <draw:image xlink:href="Pictures/100002010000028D000001ABC4C3B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2) Le théorème des valeurs intermédiaires</text:span></text:p>
          </draw:text-box>
        </draw:frame>
        <draw:frame draw:style-name="gr2" draw:text-style-name="P2" draw:layer="layout" svg:width="19.149cm" svg:height="16.792cm" svg:x="3.651cm" svg:y="3.208cm" presentation:class="graphic" presentation:user-transformed="true">
          <draw:image xlink:href="Pictures/10000201000001FD000001F6DBD650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1" draw:layer="layout" svg:width="25.199cm" svg:height="2.533cm" svg:x="1.4cm" svg:y="0.036cm" presentation:class="title" presentation:user-transformed="true">
          <draw:text-box>
            <text:p><text:span text:style-name="T2">2) Le théorème des valeurs intermédiaires : généralisation</text:span></text:p>
          </draw:text-box>
        </draw:frame>
        <draw:frame draw:style-name="gr2" draw:text-style-name="P2" draw:layer="layout" svg:width="21.254cm" svg:height="8.138cm" svg:x="2.546cm" svg:y="4.462cm" presentation:class="graphic" presentation:user-transformed="true">
          <draw:image xlink:href="Pictures/10000201000001E9000000B8F46040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1" draw:layer="layout" svg:width="25.199cm" svg:height="2.533cm" svg:x="1.232cm" svg:y="0.084cm" presentation:class="title" presentation:user-transformed="true">
          <draw:text-box>
            <text:p><text:span text:style-name="T2">Points d'attention sur le théorème des valeurs intermédiaires</text:span>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Bien vérifier les hypothèses continuité, bornes de l'intervalle, existence de limites, </text:span><text:span text:style-name="T4">stricte</text:span><text:span text:style-name="T3"> monotonie (pour l'unicité)</text:span></text:p>
              </text:list-item>
              <text:list-item>
                <text:p><text:span text:style-name="T3">Condition </text:span><text:span text:style-name="T4">suffisante</text:span><text:span text:style-name="T3"> d'existence d'une solution de l'équation f(x)=k </text:span><text:span text:style-name="T4">sur I, </text:span><text:span text:style-name="T5">condition </text:span><text:span text:style-name="T4">nécessaire et suffisante</text:span><text:span text:style-name="T5"> dans le cas strictement monotone.</text:span></text:p>
              </text:list-item>
              <text:list-item>
                <text:p><text:span text:style-name="T3">Si f continue sur I </text:span><text:span text:style-name="T4">alors </text:span><text:span text:style-name="T5">elle vérifie la propriété de la valeur intermédiaire. (Réciproque faus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3) Application aux équations de la forme f(x)=k</text:span></text:p>
          </draw:text-box>
        </draw:frame>
        <draw:frame presentation:style-name="pr7" draw:text-style-name="P5" draw:layer="layout" svg:width="25.199cm" svg:height="12.179cm" svg:x="1.4cm" svg:y="3.4cm" presentation:class="outline" presentation:user-transformed="true">
          <draw:text-box>
            <text:list text:style-name="L2">
              <text:list-header>
                <text:p><text:span text:style-name="T4">Objectif : Déterminer existence solution de l'équation f(x)=k sur intervalle I</text:span></text:p>
              </text:list-header>
              <text:list-item>
                <text:p><text:span text:style-name="T6">Vérifier que f est continue sur I et étudier ses variations sur I</text:span></text:p>
              </text:list-item>
              <text:list-item>
                <text:p><text:span text:style-name="T6">Si I est fermé : I= [a,b], montrer que k est compris entre f(a) et f(b) </text:span></text:p>
              </text:list-item>
              <text:list-item>
                <text:p><text:span text:style-name="T6">Si I est ouvert : <text:s/>I = ]a,b[, déterminer limf(x) quand x tend vers a</text:span><text:span text:style-name="T7">+ <text:s text:c="2"/></text:span><text:span text:style-name="T8">et lim f(x) quand x tend vers b</text:span><text:span text:style-name="T7">-</text:span></text:p>
              </text:list-item>
              <text:list-item>
                <text:p><text:span text:style-name="T8">Appliquer le théorème des valeurs intermédiaires : condition suffisante d'existence d'une solution et unicité si f est strictement monotone sur I</text:span></text:p>
              </text:list-item>
              <text:list-item>
                <text:p><text:span text:style-name="T8">Calcul exact de la solution : déterminer fonction réciproque</text:span></text:p>
              </text:list-item>
              <text:list-item>
                <text:p><text:span text:style-name="T8">Calcul approché de la solution par encadr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4T3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12.296cm" svg:height="8.902cm" svg:x="1.104cm" svg:y="4.698cm" presentation:class="graphic" presentation:user-transformed="true">
          <draw:image xlink:href="Pictures/1000020100000117000000CAF393F948.png" xlink:type="simple" xlink:show="embed" xlink:actuate="onLoad">
            <text:p/>
          </draw:image>
        </draw:frame>
        <draw:frame draw:style-name="gr2" draw:text-style-name="P2" draw:layer="layout" svg:width="12.296cm" svg:height="11.543cm" svg:x="14.2cm" svg:y="4.857cm" presentation:class="graphic" presentation:user-transformed="true">
          <draw:image xlink:href="Pictures/100002010000011600000105E1F2BC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5T14">
        <draw:frame presentation:style-name="pr3" draw:text-style-name="P1" draw:layer="layout" svg:width="25.199cm" svg:height="1.771cm" svg:x="1.4cm" svg:y="0.837cm" presentation:class="title">
          <draw:text-box>
            <text:p><text:span text:style-name="T2">Méthode de dichotomie pour résoudre f(x) = k</text:span></text:p>
          </draw:text-box>
        </draw:frame>
        <draw:frame presentation:style-name="pr7" draw:text-style-name="P3" draw:layer="layout" svg:width="25.199cm" svg:height="5.808cm" svg:x="1.4cm" svg:y="3.392cm" presentation:class="outline" presentation:user-transformed="true">
          <draw:text-box>
            <text:list text:style-name="L2">
              <text:list-header>
                <text:p><text:span text:style-name="T3">I = [a,b], on suppose f strictement croissante sur I</text:span></text:p>
                <text:p><text:span text:style-name="T3">Définition des suites (a(n)) et (b(</text:span><text:span text:style-name="T9">n)</text:span><text:span text:style-name="T3">) par récurrence :</text:span></text:p>
                <text:p><text:span text:style-name="T3"><text:s/></text:span><text:span text:style-name="T3">Initialisation : a(0)=a et b(0)=b</text:span></text:p>
                <text:p><text:span text:style-name="T3"><text:s/></text:span><text:span text:style-name="T3">Relation de récurrence : </text:span></text:p>
                <text:list>
                  <text:list-item>
                    <text:list>
                      <text:list-header>
                        <text:p><text:span text:style-name="T3">si f((a(n)+b(n))/2)&lt;k, alors a(n+1)=(a(n)+b(n))/2 et b(n+1)=b(n)</text:span></text:p>
                        <text:p><text:span text:style-name="T3">si f((a(n)+b(n))/2)&gt;k, alors b(n+1)=(a(n)+b(n))/2 et a(n+1)=a(n)</text:span></text:p>
                        <text:p><text:span text:style-name="T3">si f((a(n)+b(n))/2)=k, on a trouvé la solution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10" draw:text-style-name="P3" draw:layer="layout" svg:width="25.199cm" svg:height="2.808cm" svg:x="1.401cm" svg:y="15.6cm" presentation:class="outline" presentation:user-transformed="true">
          <draw:text-box>
            <text:list text:style-name="L2">
              <text:list-header>
                <text:p><text:span text:style-name="T10">Théorème :</text:span><text:span text:style-name="T3"> La suite ((a(n)+b(n))/2) converge vers la solution de f(x)=k sur 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4T3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11.4cm" svg:height="12.4cm" svg:x="1.8cm" svg:y="4.2cm" presentation:class="graphic" presentation:user-transformed="true">
          <draw:image xlink:href="Pictures/10000201000001640000017843F8E190.png" xlink:type="simple" xlink:show="embed" xlink:actuate="onLoad">
            <text:p/>
          </draw:image>
        </draw:frame>
        <draw:frame draw:style-name="gr2" draw:text-style-name="P2" draw:layer="layout" svg:width="11.2cm" svg:height="12.892cm" svg:x="14.8cm" svg:y="4.2cm" presentation:class="graphic" presentation:user-transformed="true">
          <draw:image xlink:href="Pictures/100002010000013E00000175AD7DF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color="#0066cc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3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5-27T18:42:41.221405313</meta:creation-date>
    <meta:editing-duration>PT4H2M12S</meta:editing-duration>
    <meta:editing-cycles>24</meta:editing-cycles>
    <meta:generator>OpenOffice/4.1.6$Win32 OpenOffice.org_project/416m1$Build-9790</meta:generator>
    <dc:title>Blue Curve</dc:title>
    <dc:date>2026-05-28T16:35:20.13</dc:date>
    <dc:creator>Catherine Delville</dc:creator>
    <meta:document-statistic meta:object-count="85"/>
  </office:meta>
</office:document-meta>
</file>